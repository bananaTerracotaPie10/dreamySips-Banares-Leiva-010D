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officeooo:rsid="00047b10" officeooo:paragraph-rsid="00047b1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047b10" officeooo:paragraph-rsid="00047b10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047b10" officeooo:paragraph-rsid="00047b1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Proyecto: Dreamy sips</text:h>
      <text:p text:style-name="P15"/>
      <text:p text:style-name="P15">Contexto: Dreamy sips es un negocio que vende botellas y tazas personalizadas.</text:p>
      <text:p text:style-name="P15"/>
      <text:p text:style-name="P16">Requerimientos:</text:p>
      <text:h text:style-name="Heading_20_4" text:outline-level="4">1. Requerimientos Funcionales</text:h>
      <text:h text:style-name="Heading_20_4" text:outline-level="4">1.1 Navegación y contenido</text:h>
      <text:list text:style-name="L1">
        <text:list-item>
          <text:p text:style-name="P3">El sistema debe contar con un <text:span text:style-name="Strong_20_Emphasis">menú principal</text:span> que incluya una sección de <text:span text:style-name="Emphasis">novedades</text:span>.</text:p>
        </text:list-item>
        <text:list-item>
          <text:p text:style-name="P2">El sistema debe mostrar un <text:span text:style-name="Strong_20_Emphasis">catálogo de diseños predeterminados</text:span> disponibles para los usuarios.</text:p>
        </text:list-item>
      </text:list>
      <text:h text:style-name="Heading_20_4" text:outline-level="4">1.2 Gestión de productos</text:h>
      <text:list text:style-name="L2">
        <text:list-item>
          <text:p text:style-name="P5">El usuario debe poder <text:span text:style-name="Strong_20_Emphasis">seleccionar el tipo de producto</text:span>, eligiendo entre:</text:p>
        </text:list-item>
        <text:list-item>
          <text:p text:style-name="P5">Taza</text:p>
        </text:list-item>
        <text:list-item>
          <text:p text:style-name="P5">Botella</text:p>
        </text:list-item>
        <text:list-item>
          <text:p text:style-name="P4">El sistema debe permitir al usuario <text:span text:style-name="Strong_20_Emphasis">agregar más de una unidad</text:span> de un producto en una misma compra.</text:p>
        </text:list-item>
      </text:list>
      <text:h text:style-name="Heading_20_4" text:outline-level="4">1.3 Carrito de compras</text:h>
      <text:list text:style-name="L3">
        <text:list-item>
          <text:p text:style-name="P7">El sistema debe incluir una <text:span text:style-name="Strong_20_Emphasis">cesta o carrito de compras</text:span> donde el usuario pueda:</text:p>
        </text:list-item>
        <text:list-item>
          <text:p text:style-name="P7">Visualizar los productos seleccionados</text:p>
        </text:list-item>
        <text:list-item>
          <text:p text:style-name="P7">Modificar cantidades</text:p>
        </text:list-item>
        <text:list-item>
          <text:p text:style-name="P6">Eliminar productos</text:p>
        </text:list-item>
      </text:list>
      <text:h text:style-name="Heading_20_4" text:outline-level="4">1.4 Proceso de compra</text:h>
      <text:list text:style-name="L4">
        <text:list-item>
          <text:p text:style-name="P9">El sistema debe permitir elegir el <text:span text:style-name="Strong_20_Emphasis">método de pago</text:span>, entre:</text:p>
        </text:list-item>
        <text:list-item>
          <text:p text:style-name="P9">Pago en línea</text:p>
        </text:list-item>
        <text:list-item>
          <text:p text:style-name="P9">Pago en efectivo</text:p>
        </text:list-item>
        <text:list-item>
          <text:p text:style-name="P9">El usuario debe poder seleccionar la <text:span text:style-name="Strong_20_Emphasis">modalidad de entrega</text:span>, entre:</text:p>
        </text:list-item>
        <text:list-item>
          <text:p text:style-name="P9">Envío a domicilio</text:p>
        </text:list-item>
        <text:list-item>
          <text:p text:style-name="P8">Retiro en tienda</text:p>
        </text:list-item>
      </text:list>
      <text:h text:style-name="Heading_20_4" text:outline-level="4">1.5 Historial y comprobantes</text:h>
      <text:list text:style-name="L5">
        <text:list-item>
          <text:p text:style-name="P11">El sistema debe almacenar un <text:span text:style-name="Strong_20_Emphasis">historial de compras</text:span> accesible para el usuario.</text:p>
        </text:list-item>
        <text:list-item>
          <text:p text:style-name="P11">El sistema debe generar una <text:span text:style-name="Strong_20_Emphasis">boleta de compra</text:span> que:</text:p>
        </text:list-item>
        <text:list-item>
          <text:p text:style-name="P11">Sea enviada al correo electrónico del cliente</text:p>
        </text:list-item>
        <text:list-item>
          <text:p text:style-name="P10">Quede registrada en el sistema para que el vendedor pueda consultarla</text:p>
        </text:list-item>
      </text:list>
      <text:h text:style-name="Heading_20_4" text:outline-level="4">1.6 Comunicación</text:h>
      <text:list text:style-name="L6">
        <text:list-item>
          <text:p text:style-name="P12">El sistema debe incluir un <text:span text:style-name="Strong_20_Emphasis">enlace a un chat de red social</text:span> para la atención al cliente.</text:p>
        </text:list-item>
      </text:list>
      <text:h text:style-name="Heading_20_4" text:outline-level="4"><text:soft-page-break/>2. Requerimientos No Funcionales</text:h>
      <text:list text:style-name="L7">
        <text:list-item>
          <text:p text:style-name="P14">El sistema debe ser <text:span text:style-name="Strong_20_Emphasis">fácil de usar</text:span> y con interfaz intuitiva.</text:p>
        </text:list-item>
        <text:list-item>
          <text:p text:style-name="P14">Debe garantizar la <text:span text:style-name="Strong_20_Emphasis">seguridad de los datos del usuario</text:span>, especialmente en pagos en línea.</text:p>
        </text:list-item>
        <text:list-item>
          <text:p text:style-name="P14">El sistema debe estar disponible en navegadores web modernos.</text:p>
        </text:list-item>
        <text:list-item>
          <text:p text:style-name="P13">El envío de correos electrónicos debe realizarse en un <text:span text:style-name="Strong_20_Emphasis">tiempo adecuado (casi inmediato)</text:span> tras la compra. 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21:42:10.795398061</meta:creation-date>
    <dc:date>2026-04-21T22:10:51.045691483</dc:date>
    <meta:editing-duration>PT17M5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36" meta:word-count="288" meta:character-count="1665" meta:non-whitespace-character-count="1437"/>
  </office:meta>
</office:document-meta>
</file>